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8BECF416E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03cm" style:rel-column-width="4935*"/>
    </style:style>
    <style:style style:name="Table1.B" style:family="table-column">
      <style:table-column-properties style:column-width="8.886cm" style:rel-column-width="5040*"/>
    </style:style>
    <style:style style:name="Table1.1" style:family="table-row">
      <style:table-row-properties style:min-row-height="4.498cm"/>
    </style:style>
    <style:style style:name="Table1.A1" style:family="table-cell">
      <style:table-cell-properties fo:padding="0cm" fo:border-left="0.05pt solid #ffffff" fo:border-right="none" fo:border-top="0.05pt solid #ffffff" fo:border-bottom="0.05pt solid #ffffff"/>
    </style:style>
    <style:style style:name="Table1.B1" style:family="table-cell">
      <style:table-cell-properties fo:padding="0cm" fo:border="0.05pt solid #ffffff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cm" style:rel-column-width="4932*"/>
    </style:style>
    <style:style style:name="Table2.B" style:family="table-column">
      <style:table-column-properties style:column-width="8.89cm" style:rel-column-width="5040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cm" fo:border-left="0.05pt solid #ffffff" fo:border-right="none" fo:border-top="0.05pt solid #ffffff" fo:border-bottom="0.05pt solid #ffffff"/>
    </style:style>
    <style:style style:name="Table2.B1" style:family="table-cell">
      <style:table-cell-properties fo:padding="0cm" fo:border="0.05pt solid #ffffff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7.17cm" style:rel-column-width="4066*"/>
    </style:style>
    <style:style style:name="Table3.B" style:family="table-column">
      <style:table-column-properties style:column-width="4.404cm" style:rel-column-width="2498*"/>
    </style:style>
    <style:style style:name="Table3.C" style:family="table-column">
      <style:table-column-properties style:column-width="3.025cm" style:rel-column-width="1716*"/>
    </style:style>
    <style:style style:name="Table3.D" style:family="table-column">
      <style:table-column-properties style:column-width="2.988cm" style:rel-column-width="1695*"/>
    </style:style>
    <style:style style:name="Table3.1" style:family="table-row">
      <style:table-row-properties style:min-row-height="0.609cm" fo:background-color="#c0c0c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-left="0.5pt solid #000000" fo:border-right="0.5pt solid #000000" fo:border-top="0.5pt solid #000000" fo:border-bottom="0.5pt solid #000000"/>
    </style:style>
    <style:style style:name="Table3.2" style:family="table-row">
      <style:table-row-properties style:min-row-height="0.598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614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1.506cm" style:rel-column-width="6523*"/>
    </style:style>
    <style:style style:name="Table4.B" style:family="table-column">
      <style:table-column-properties style:column-width="6.084cm" style:rel-column-width="3449*"/>
    </style:style>
    <style:style style:name="Table4.1" style:family="table-row">
      <style:table-row-properties style:min-row-height="3.096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size="20pt" officeooo:rsid="0011f08b" officeooo:paragraph-rsid="0011f08b" style:font-size-asian="20pt" style:font-size-complex="20pt"/>
    </style:style>
    <style:style style:name="P2" style:family="paragraph" style:parent-style-name="Standard">
      <style:paragraph-properties fo:line-height="115%" fo:text-align="start" style:justify-single-word="false"/>
      <style:text-properties fo:font-size="15pt" fo:font-weight="bold" officeooo:rsid="0011f08b" officeooo:paragraph-rsid="00123c0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5pt" fo:font-weight="bold" officeooo:rsid="0011f08b" officeooo:paragraph-rsid="0013402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5pt" fo:font-weight="bold" officeooo:rsid="00134023" officeooo:paragraph-rsid="0013402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5pt" fo:font-weight="bold" officeooo:rsid="004724a3" officeooo:paragraph-rsid="004724a3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officeooo:rsid="0011f08b" officeooo:paragraph-rsid="00123c0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11f08b" officeooo:paragraph-rsid="0013402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1f08b" officeooo:paragraph-rsid="00123c0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134023" officeooo:paragraph-rsid="0013402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19fbbd" officeooo:paragraph-rsid="0019fb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519e4f" officeooo:paragraph-rsid="00519e4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544a07" officeooo:paragraph-rsid="00544a0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officeooo:rsid="0020df84" officeooo:paragraph-rsid="0020df8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8b244" officeooo:paragraph-rsid="0028b24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8b244" officeooo:paragraph-rsid="0028b244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officeooo:rsid="0028b244" officeooo:paragraph-rsid="0028b24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aa77d" officeooo:paragraph-rsid="002aa77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aa77d" officeooo:paragraph-rsid="002aa77d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officeooo:rsid="002aa77d" officeooo:paragraph-rsid="002aa77d" style:font-size-asian="12pt" style:font-size-complex="12pt"/>
    </style:style>
    <style:style style:name="P21" style:family="paragraph" style:parent-style-name="Table_20_Contents">
      <style:paragraph-properties fo:line-height="100%" fo:text-align="start" style:justify-single-word="false"/>
      <style:text-properties fo:font-size="12pt" fo:font-weight="normal" officeooo:rsid="00310e4e" officeooo:paragraph-rsid="00310e4e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line-height="115%" fo:text-align="start" style:justify-single-word="false"/>
      <style:text-properties fo:font-size="12pt" fo:font-weight="normal" officeooo:rsid="00310e4e" officeooo:paragraph-rsid="00310e4e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line-height="115%" fo:text-align="start" style:justify-single-word="false"/>
      <style:text-properties fo:font-size="12pt" fo:font-weight="bold" officeooo:rsid="002d8efc" officeooo:paragraph-rsid="002d8ef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font-size="12pt" fo:font-style="normal" style:text-underline-style="none" fo:font-weight="bold" officeooo:rsid="00310e4e" officeooo:paragraph-rsid="00310e4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fo:font-size="12pt" officeooo:rsid="0020df84" officeooo:paragraph-rsid="0020df84" style:font-size-asian="12pt" style:font-size-complex="12pt"/>
    </style:style>
    <style:style style:name="T1" style:family="text">
      <style:text-properties officeooo:rsid="0019fbbd"/>
    </style:style>
    <style:style style:name="T2" style:family="text">
      <style:text-properties officeooo:rsid="002aa77d"/>
    </style:style>
    <style:style style:name="T3" style:family="text">
      <style:text-properties officeooo:rsid="002d8efc"/>
    </style:style>
    <style:style style:name="T4" style:family="text">
      <style:text-properties officeooo:rsid="0044ca94"/>
    </style:style>
    <style:style style:name="T5" style:family="text">
      <style:text-properties officeooo:rsid="0060395f"/>
    </style:style>
    <style:style style:name="T6" style:family="text">
      <style:text-properties officeooo:rsid="00687215"/>
    </style:style>
    <style:style style:name="T7" style:family="text">
      <style:text-properties officeooo:rsid="007e23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<text:span text:style-name="T4">RRON WARE</text:span></text:p>
            <text:p text:style-name="P6">14 Cedar Close</text:p>
            <text:p text:style-name="P6">Middlewich</text:p>
            <text:p text:style-name="P6">CW10 0RT</text:p>
            <text:p text:style-name="P6"><text:a xlink:type="simple" xlink:href="mailto:Arronware77@gmail.com" text:style-name="Internet_20_link" text:visited-style-name="Visited_20_Internet_20_Link">Arronware77@gmail.com</text:a></text:p>
            <text:p text:style-name="P6">07498634165</text:p>
            <text:p text:style-name="P6"/>
          </table:table-cell>
          <table:table-cell table:style-name="Table1.B1" office:value-type="string">
            <text:p text:style-name="P2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B<text:span text:style-name="T4">ILLING TO</text:span></text:p>
            <text:p text:style-name="P7">Vinco Sport LTD</text:p>
            <text:p text:style-name="P7">Suite 5,</text:p>
            <text:p text:style-name="P7">76 Water Lane,</text:p>
            <text:p text:style-name="P7">Wilmslow</text:p>
            <text:p text:style-name="P7">SK9 5BB</text:p>
          </table:table-cell>
          <table:table-cell table:style-name="Table2.B1" office:value-type="string">
            <text:p text:style-name="P4">I<text:span text:style-name="T4">NVOICE</text:span></text:p>
            <text:p text:style-name="P9">Invoice No: <text:s text:c="10"/>INV-0001 </text:p>
            <text:p text:style-name="P9">Issue Date: <text:s text:c="11"/><text:span text:style-name="T1">24.05.2026</text:span></text:p>
            <text:p text:style-name="P10">Due Date: <text:s text:c="13"/>30.05.2026?????</text:p>
            <text:p text:style-name="P7"/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Description</text:p>
          </table:table-cell>
          <table:table-cell table:style-name="Table3.B1" office:value-type="string">
            <text:p text:style-name="P14">Quantity</text:p>
          </table:table-cell>
          <table:table-cell table:style-name="Table3.C1" office:value-type="string">
            <text:p text:style-name="P14">Unit Price</text:p>
          </table:table-cell>
          <table:table-cell table:style-name="Table3.D1" office:value-type="string">
            <text:p text:style-name="P14">Amount</text:p>
          </table:table-cell>
        </table:table-row>
        <table:table-row table:style-name="Table3.2">
          <table:table-cell table:style-name="Table3.A2" office:value-type="string">
            <text:p text:style-name="P15"><text:span text:style-name="T7">23/05/26 - </text:span>Replay Operator</text:p>
          </table:table-cell>
          <table:table-cell table:style-name="Table3.B2" office:value-type="string">
            <text:p text:style-name="P16">1</text:p>
          </table:table-cell>
          <table:table-cell table:style-name="Table3.C2" office:value-type="string">
            <text:p text:style-name="P16"><text:span text:style-name="T2">$</text:span>168</text:p>
          </table:table-cell>
          <table:table-cell table:style-name="Table3.D2" office:value-type="string">
            <text:p text:style-name="P17">$168</text:p>
          </table:table-cell>
        </table:table-row>
        <table:table-row table:style-name="Table3.3">
          <table:table-cell table:style-name="Table3.A3" office:value-type="string">
            <text:p text:style-name="P18">Train Travel (Receipt Evidenced Below)</text:p>
          </table:table-cell>
          <table:table-cell table:style-name="Table3.B3" office:value-type="string">
            <text:p text:style-name="P19">1</text:p>
          </table:table-cell>
          <table:table-cell table:style-name="Table3.C3" office:value-type="string">
            <text:p text:style-name="P19">£9.25/$12.43</text:p>
          </table:table-cell>
          <table:table-cell table:style-name="Table3.D3" office:value-type="string">
            <text:p text:style-name="P20">$12.43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23">Subtotal <text:s text:c="26"/>$180.43</text:p>
            <text:p text:style-name="P22">VAT <text:s text:c="38"/>N/A</text:p>
            <text:p text:style-name="P21">-----------------------------------------</text:p>
            <text:p text:style-name="P24">Total <text:s text:c="32"/><text:span text:style-name="T3">$180.43</text:span></text:p>
          </table:table-cell>
        </table:table-row>
      </table:table>
      <text:p text:style-name="P5">PAY BY BANK TRANSFER</text:p>
      <text:p text:style-name="P11">Bank/Sort Code: 77-12-32</text:p>
      <text:p text:style-name="P11">Account Number: 19252068</text:p>
      <text:p text:style-name="P12">Payment Reference: <text:span text:style-name="T5">Arron </text:span><text:span text:style-name="T6">Ware</text:span></text:p>
      <text:p text:style-name="P11">Lloyds Bank PLC</text:p>
      <text:p text:style-name="P11"/>
      <text:p text:style-name="P11"/>
      <text:p text:style-name="P11"/>
      <text:p text:style-name="P11"/>
      <text:p text:style-name="P11"><draw:frame draw:style-name="fr1" draw:name="Image1" text:anchor-type="char" svg:width="16.778cm" svg:height="27.94cm" draw:z-index="0"><draw:image xlink:href="Pictures/1000000100000540000008BECF416EF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4T13:54:44.778775213</meta:creation-date>
    <dc:date>2026-05-24T14:42:38.600918611</dc:date>
    <meta:editing-duration>PT47M45S</meta:editing-duration>
    <meta:editing-cycles>23</meta:editing-cycles>
    <meta:generator>LibreOffice/24.2.7.2$Linux_X86_64 LibreOffice_project/420$Build-2</meta:generator>
    <meta:document-statistic meta:table-count="4" meta:image-count="1" meta:object-count="0" meta:page-count="2" meta:paragraph-count="37" meta:word-count="77" meta:character-count="657" meta:non-whitespace-character-count="486"/>
  </office:meta>
</office:document-meta>
</file>